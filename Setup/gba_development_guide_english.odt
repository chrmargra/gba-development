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Courier New" svg:font-family="'Courier New'"/>
    <style:font-face style:name="Tahoma" svg:font-family="Tahoma" style:font-family-generic="system" style:font-pitch="variable"/>
  </office:font-face-decls>
  <office:automatic-styles>
    <style:style style:name="Table0" style:family="table">
      <style:table-properties style:width="17cm" table:align="margins"/>
    </style:style>
    <style:style style:name="Table0.A" style:family="table-column">
      <style:table-column-properties style:column-width="17cm" style:rel-column-width="65535*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P1" style:family="paragraph" style:parent-style-name="Standard" style:list-style-name="">
      <style:paragraph-properties fo:margin-top="0cm" fo:margin-bottom="0.3cm" style:contextual-spacing="false"/>
      <style:text-properties style:font-name="Arial" fo:font-size="22pt" fo:font-weight="bold"/>
    </style:style>
    <style:style style:name="P2" style:family="paragraph" style:parent-style-name="Standard">
      <style:paragraph-properties fo:margin-top="0cm" fo:margin-bottom="0.18cm" style:contextual-spacing="false" fo:line-height="120%"/>
      <style:text-properties style:font-name="Arial" fo:font-size="11pt"/>
    </style:style>
    <style:style style:name="P3" style:family="paragraph" style:parent-style-name="Standard">
      <style:text-properties style:font-name="Arial" fo:font-size="10.5pt"/>
    </style:style>
    <style:style style:name="P4" style:family="paragraph" style:parent-style-name="Standard">
      <style:paragraph-properties fo:margin-top="0cm" fo:margin-bottom="0.18cm" style:contextual-spacing="false" fo:line-height="120%" fo:text-align="center" style:justify-single-word="false"/>
      <style:text-properties style:font-name="Arial" fo:font-size="11pt" officeooo:rsid="000548d9" officeooo:paragraph-rsid="000548d9"/>
    </style:style>
    <style:style style:name="P5" style:family="paragraph" style:parent-style-name="Standard" style:list-style-name="">
      <style:paragraph-properties fo:margin-top="0.45cm" fo:margin-bottom="0.18cm" style:contextual-spacing="false"/>
      <style:text-properties style:font-name="Arial" fo:font-size="16pt" fo:font-weight="bold"/>
    </style:style>
    <style:style style:name="P6" style:family="paragraph" style:parent-style-name="Standard" style:list-style-name="L1">
      <style:paragraph-properties fo:margin-top="0cm" fo:margin-bottom="0.101cm" style:contextual-spacing="false"/>
      <style:text-properties style:font-name="Arial" fo:font-size="11pt"/>
    </style:style>
    <style:style style:name="P7" style:family="paragraph" style:parent-style-name="Standard">
      <loext:graphic-properties draw:fill="solid" draw:fill-color="#f5f5f5" draw:opacity="100%"/>
      <style:paragraph-properties fo:margin-top="0.079cm" fo:margin-bottom="0.22cm" style:contextual-spacing="false" fo:background-color="#f5f5f5" fo:padding="0.139cm" fo:border="none"/>
      <style:text-properties style:font-name="Courier New" fo:font-size="9.5pt"/>
    </style:style>
    <style:style style:name="P8" style:family="paragraph" style:parent-style-name="Standard" style:list-style-name="L2">
      <style:paragraph-properties fo:margin-top="0cm" fo:margin-bottom="0.101cm" style:contextual-spacing="false"/>
      <style:text-properties style:font-name="Arial" fo:font-size="11pt"/>
    </style:style>
    <text:list-style style:name="L1">
      <text:list-level-style-bullet text:level="1" loext:num-list-format="%1%" text:bullet-char="•">
        <style:list-level-properties text:min-label-width="0.6cm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" style:num-format="1">
        <style:list-level-properties text:min-label-width="0.6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plete guide to developing for Game Boy Advance on macOS</text:h>
      <text:p text:style-name="P2">Installation of devkitPro, devkitARM configuration, creation of an example project, compilation of a .gba ROM, and execution in mGBA.</text:p>
      <table:table table:name="Table0" table:style-name="Table0">
        <table:table-column table:style-name="Table0.A"/>
        <table:table-row>
          <table:table-cell office:value-type="string">
            <text:p text:style-name="P3">Objective: Document the entire process we followed: installing the modern devkitPro environment, preparing the terminal, compiling the GBA template, and running the ROM in an emulator.</text:p>
          </table:table-cell>
        </table:table-row>
      </table:table>
      <text:p text:style-name="P4"><text:a xlink:type="simple" xlink:href="https://www.migsantiago.com/index.php/tutoriales/tutorial-de-programacion-para-game-boy-advance" text:style-name="Internet_20_link" text:visited-style-name="Visited_20_Internet_20_Link"/></text:p>
      <text:p text:style-name="P4"><text:a xlink:type="simple" xlink:href="https://www.migsantiago.com/index.php/tutoriales/tutorial-de-programacion-para-game-boy-advance" text:style-name="Internet_20_link" text:visited-style-name="Visited_20_Internet_20_Link">https://www.migsantiago.com/index.php/tutoriales/tutorial-de-programacion-para-game-boy-advance</text:a></text:p>
      <text:h text:style-name="P5" text:outline-level="1">1. Final result achieved</text:h>
      <text:p text:style-name="P2">After completing the process, the environment was working correctly. These were the key checks: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3">Item</text:p>
          </table:table-cell>
          <table:table-cell office:value-type="string">
            <text:p text:style-name="P3">Expected result</text:p>
          </table:table-cell>
          <table:table-cell office:value-type="string">
            <text:p text:style-name="P3">Status</text:p>
          </table:table-cell>
        </table:table-row>
        <table:table-row>
          <table:table-cell office:value-type="string">
            <text:p text:style-name="P3">devkitPro</text:p>
          </table:table-cell>
          <table:table-cell office:value-type="string">
            <text:p text:style-name="P3">/opt/devkitpro exists</text:p>
          </table:table-cell>
          <table:table-cell office:value-type="string">
            <text:p text:style-name="P3">Correct</text:p>
          </table:table-cell>
        </table:table-row>
        <table:table-row>
          <table:table-cell office:value-type="string">
            <text:p text:style-name="P3">dkp-pacman</text:p>
          </table:table-cell>
          <table:table-cell office:value-type="string">
            <text:p text:style-name="P3">which dkp-pacman returns a path</text:p>
          </table:table-cell>
          <table:table-cell office:value-type="string">
            <text:p text:style-name="P3">Correct</text:p>
          </table:table-cell>
        </table:table-row>
        <table:table-row>
          <table:table-cell office:value-type="string">
            <text:p text:style-name="P3">devkitARM</text:p>
          </table:table-cell>
          <table:table-cell office:value-type="string">
            <text:p text:style-name="P3">/opt/devkitpro/devkitARM exists</text:p>
          </table:table-cell>
          <table:table-cell office:value-type="string">
            <text:p text:style-name="P3">Correct</text:p>
          </table:table-cell>
        </table:table-row>
        <table:table-row>
          <table:table-cell office:value-type="string">
            <text:p text:style-name="P3">Compiler</text:p>
          </table:table-cell>
          <table:table-cell office:value-type="string">
            <text:p text:style-name="P3">arm-none-eabi-gcc --version shows a version</text:p>
          </table:table-cell>
          <table:table-cell office:value-type="string">
            <text:p text:style-name="P3">Correct</text:p>
          </table:table-cell>
        </table:table-row>
        <table:table-row>
          <table:table-cell office:value-type="string">
            <text:p text:style-name="P3">GBA example</text:p>
          </table:table-cell>
          <table:table-cell office:value-type="string">
            <text:p text:style-name="P3">make generates a .gba file</text:p>
          </table:table-cell>
          <table:table-cell office:value-type="string">
            <text:p text:style-name="P3">Correct</text:p>
          </table:table-cell>
        </table:table-row>
        <table:table-row>
          <table:table-cell office:value-type="string">
            <text:p text:style-name="P3">Final ROM</text:p>
          </table:table-cell>
          <table:table-cell office:value-type="string">
            <text:p text:style-name="P3">GBAPrhello-gba.gba works in the emulator</text:p>
          </table:table-cell>
          <table:table-cell office:value-type="string">
            <text:p text:style-name="P3">Correct</text:p>
          </table:table-cell>
        </table:table-row>
      </table:table>
      <text:h text:style-name="P5" text:outline-level="1">2. What tools are used</text:h>
      <text:list text:style-name="L1">
        <text:list-item>
          <text:p text:style-name="P6">devkitPro: Set of tools for homebrew development on consoles, including Game Boy Advance.</text:p>
        </text:list-item>
        <text:list-item>
          <text:p text:style-name="P6">devkitPro pacman / dkp-pacman: Package manager used to install devkitARM, libgba, examples, and tools.</text:p>
        </text:list-item>
        <text:list-item>
          <text:p text:style-name="P6">devkitARM: ARM compilation toolchain used for GBA.</text:p>
        </text:list-item>
        <text:list-item>
          <text:p text:style-name="P6">libgba: Base library for accessing video, buttons, interrupts, and GBA-specific functions.</text:p>
        </text:list-item>
        <text:list-item>
          <text:p text:style-name="P6">make: Tool used by the Makefile to compile the project.</text:p>
        </text:list-item>
        <text:list-item>
          <text:p text:style-name="P6">gbafix: Tool that fixes the .gba ROM header at the end of the compilation.</text:p>
        </text:list-item>
        <text:list-item>
          <text:p text:style-name="P6">mGBA: Recommended emulator for testing the .gba ROM on the Mac.</text:p>
        </text:list-item>
      </text:list>
      <text:h text:style-name="P5" text:outline-level="1">3. Initial devkitPro installation</text:h>
      <text:p text:style-name="P2">First, install the devkitPro package manager. On macOS, download the devkitPro pacman .pkg installer from the official releases page.</text:p>
      <text:p text:style-name="P7">https://github.com/devkitPro/pacman/releases/latest</text:p>
      <text:p text:style-name="P2">The file to download is usually named something similar to:</text:p>
      <text:p text:style-name="P7">devkitpro-pacman-installer.pkg</text:p>
      <text:p text:style-name="P2">After installing the package, it is recommended to restart the Mac so the system correctly loads the installed environment variables and paths.</text:p>
      <table:table table:name="Table2" table:style-name="Table2">
        <table:table-column table:style-name="Table2.A"/>
        <table:table-row>
          <table:table-cell office:value-type="string">
            <text:p text:style-name="P3">Note: In our case, at first echo $DEVKITPRO did not show anything. That did not necessarily mean devkitPro was not installed; it only indicated that the variable was not configured in the terminal.</text:p>
          </table:table-cell>
        </table:table-row>
      </table:table>
      <text:p text:style-name="P2"/>
      <text:h text:style-name="P5" text:outline-level="1"><text:soft-page-break/>4. Check that devkitPro exists</text:h>
      <text:p text:style-name="P2">To check whether devkitPro was installed, we used:</text:p>
      <text:p text:style-name="P7">ls /opt/devkitpro</text:p>
      <text:p text:style-name="P2">At first, only this appeared:</text:p>
      <text:p text:style-name="P7">pacman</text:p>
      <text:p text:style-name="P2">That meant the pacman installer was present, but the complete GBA environment still had to be installed.</text:p>
      <text:h text:style-name="P5" text:outline-level="1">5. Check dkp-pacman</text:h>
      <text:p text:style-name="P2">Then we verified that the dkp-pacman command was available in the terminal:</text:p>
      <text:p text:style-name="P7">which dkp-pacman</text:p>
      <text:p text:style-name="P2">The result was:</text:p>
      <text:p text:style-name="P7">/usr/local/bin/dkp-pacman</text:p>
      <text:p text:style-name="P2">That result is correct. It means dkp-pacman can now be executed without writing the full path.</text:p>
      <text:h text:style-name="P5" text:outline-level="1">6. Update and install the GBA environment</text:h>
      <text:p text:style-name="P2">First, update the devkitPro package database:</text:p>
      <text:p text:style-name="P7">sudo dkp-pacman -Syu</text:p>
      <text:p text:style-name="P2">Then install the required packages for Game Boy Advance:</text:p>
      <text:p text:style-name="P7">sudo dkp-pacman -S gba-dev gba-examples</text:p>
      <text:p text:style-name="P2">When pacman asks whether you want to install the packages or continue, normally it is enough to press Enter to accept the default option.</text:p>
      <text:h text:style-name="P5" text:outline-level="1">7. Check that the correct folders were installed</text:h>
      <text:p text:style-name="P2">After installing gba-dev and gba-examples, we listed /opt/devkitpro again:</text:p>
      <text:p text:style-name="P7">ls /opt/devkitpro</text:p>
      <text:p text:style-name="P2">The correct result was similar to this:</text:p>
      <text:p text:style-name="P7">cmake examples libtonc pacman tools<text:line-break/>devkitARM libgba licenses portlibs</text:p>
      <text:p text:style-name="P2">The important thing here is that devkitARM, libgba, examples, and tools now appear.</text:p>
      <text:h text:style-name="P5" text:outline-level="1">8. Configure environment variables in zsh</text:h>
      <text:p text:style-name="P2">Although devkitARM was already installed, when running arm-none-eabi-gcc --version the terminal did not detect the command. The problem was that devkitARM/bin had not been added to the PATH.</text:p>
      <text:p text:style-name="P2"><text:soft-page-break/>We opened the zsh configuration file:</text:p>
      <text:p text:style-name="P7">nano ~/.zshrc</text:p>
      <text:p text:style-name="P2">And added these lines at the end:</text:p>
      <text:p text:style-name="P7">export DEVKITPRO=/opt/devkitpro<text:line-break/>export DEVKITARM=${DEVKITPRO}/devkitARM<text:line-break/>export PATH=${DEVKITPRO}/pacman/bin:${DEVKITPRO}/tools/bin:${DEVKITARM}/bin:$PATH</text:p>
      <text:p text:style-name="P2">To save in nano:</text:p>
      <text:p text:style-name="P7">CTRL + O<text:line-break/>Enter<text:line-break/>CTRL + X</text:p>
      <text:p text:style-name="P2">Then we reloaded the configuration:</text:p>
      <text:p text:style-name="P7">source ~/.zshrc</text:p>
      <text:h text:style-name="P5" text:outline-level="1">9. Verify variables and compiler</text:h>
      <text:p text:style-name="P2">We checked the variables:</text:p>
      <text:p text:style-name="P7">echo $DEVKITPRO<text:line-break/>echo $DEVKITARM</text:p>
      <text:p text:style-name="P2">The correct result was:</text:p>
      <text:p text:style-name="P7">/opt/devkitpro<text:line-break/>/opt/devkitpro/devkitARM</text:p>
      <text:p text:style-name="P2">Then we checked the compiler path:</text:p>
      <text:p text:style-name="P7">which arm-none-eabi-gcc</text:p>
      <text:p text:style-name="P2">Correct result:</text:p>
      <text:p text:style-name="P7">/opt/devkitpro/devkitARM/bin/arm-none-eabi-gcc</text:p>
      <text:p text:style-name="P2">And finally we checked the version:</text:p>
      <text:p text:style-name="P7">arm-none-eabi-gcc --version</text:p>
      <text:p text:style-name="P2">In our case, this appeared:</text:p>
      <text:p text:style-name="P7">arm-none-eabi-gcc (devkitARM) 16.1.0</text:p>
      <text:h text:style-name="P5" text:outline-level="1">10. Create a folder for GBA projects</text:h>
      <text:p text:style-name="P2">You can keep your projects in any folder. In our case, you were using a folder called Sample. An organized option would be:</text:p>
      <text:p text:style-name="P7">mkdir -p ~/GBAProjects</text:p>
      <text:p text:style-name="P2">But it is also valid to work in another folder, for example:</text:p>
      <text:p text:style-name="P7">~/Sample</text:p>
      <text:h text:style-name="P5" text:outline-level="1"><text:soft-page-break/>11. View available GBA examples</text:h>
      <text:p text:style-name="P2">To view the examples installed by devkitPro:</text:p>
      <text:p text:style-name="P7">ls /opt/devkitpro/examples/gba</text:p>
      <text:p text:style-name="P2">The idea is to copy a base example or template and modify it from there.</text:p>
      <text:h text:style-name="P5" text:outline-level="1">12. Create the example project</text:h>
      <text:p text:style-name="P2">The general flow to create a project from the template is:</text:p>
      <text:p text:style-name="P7">mkdir -p ~/GBAProjects<text:line-break/>cp -r /opt/devkitpro/examples/gba/template ~/GBAProjects/hello-gba<text:line-break/>cd ~/GBAProjects/hello-gba</text:p>
      <text:p text:style-name="P2">In your case, the project ended up being named:</text:p>
      <text:p text:style-name="P7">GBAPrhello-gba</text:p>
      <text:p text:style-name="P2">And you were inside it before compiling:</text:p>
      <text:p text:style-name="P7">cd GBAPrhello-gba</text:p>
      <text:h text:style-name="P5" text:outline-level="1">13. Basic project structure</text:h>
      <text:p text:style-name="P2">After copying the template, the project folder had a structure similar to this:</text:p>
      <text:p text:style-name="P7">GBAPrhello-gba/<text:line-break/>├── Makefile<text:line-break/>├── source/<text:line-break/>│ └── template.c<text:line-break/>└── build/</text:p>
      <text:p text:style-name="P2">After compiling, files like these were also generated:</text:p>
      <text:p text:style-name="P7">GBAPrhello-gba.elf<text:line-break/>GBAPrhello-gba.gba</text:p>
      <text:p text:style-name="P2">The important file to run in the emulator is the .gba file.</text:p>
      <text:h text:style-name="P5" text:outline-level="1">14. Compile the ROM</text:h>
      <text:p text:style-name="P2">Inside the project folder, we ran:</text:p>
      <text:p text:style-name="P7">make</text:p>
      <text:p text:style-name="P2">During compilation, messages like these appeared:</text:p>
      <text:p text:style-name="P7">template.c<text:line-break/>linking cartridge<text:line-break/>built ... GBAPrhello-gba.gba<text:line-break/>ROM fixed!</text:p>
      <text:p text:style-name="P2">The important thing is that these lines appeared:</text:p>
      <text:p text:style-name="P7">built ... GBAPrhello-gba.gba<text:line-break/>ROM fixed!</text:p>
      <text:p text:style-name="P2"><text:soft-page-break/>That confirmed the compilation was successful and the ROM was prepared.</text:p>
      <text:h text:style-name="P5" text:outline-level="1">15. About the shell-init / getcwd message</text:h>
      <text:p text:style-name="P2">During compilation, this message appeared several times:</text:p>
      <text:p text:style-name="P7">shell-init: error retrieving current directory: getcwd: cannot access parent directories: Bad file descriptor</text:p>
      <text:p text:style-name="P2">Although it looks like a serious error, in this case it did not prevent compilation. The proof is that the .gba file was generated and ROM fixed appeared.</text:p>
      <text:p text:style-name="P2">This message usually indicates that the terminal was in a folder whose context became invalid, for example because the folder was moved, renamed, deleted, or the terminal session lost correct access to the current directory.</text:p>
      <text:p text:style-name="P2">Recommended solution:</text:p>
      <text:p text:style-name="P7">cd ~<text:line-break/>cd ~/Sample/GBAPrhello-gba<text:line-break/>pwd<text:line-break/>make clean<text:line-break/>make</text:p>
      <text:p text:style-name="P2">If the message no longer appears after leaving and re-entering the folder, it was related to the session or current directory, not to devkitPro.</text:p>
      <text:h text:style-name="P5" text:outline-level="1">16. Locate the generated ROM</text:h>
      <text:p text:style-name="P2">To search for the .gba file inside the project:</text:p>
      <text:p text:style-name="P7">find . -name "*.gba"</text:p>
      <text:p text:style-name="P2">In your case, the generated file was:</text:p>
      <text:p text:style-name="P7">GBAPrhello-gba.gba</text:p>
      <text:p text:style-name="P2">That is the file opened in the emulator.</text:p>
      <text:h text:style-name="P5" text:outline-level="1">17. Install and open mGBA</text:h>
      <text:p text:style-name="P2">To test GBA ROMs on macOS, mGBA is recommended. If you have Homebrew installed, it can be installed like this:</text:p>
      <text:p text:style-name="P7">brew install --cask mgba</text:p>
      <text:p text:style-name="P2">To open the ROM from the terminal:</text:p>
      <text:p text:style-name="P7">open -a mGBA GBAPrhello-gba.gba</text:p>
      <text:p text:style-name="P2">You can also open mGBA manually and drag the .gba file into the emulator window.</text:p>
      <text:h text:style-name="P5" text:outline-level="1">18. Normal workflow</text:h>
      <text:p text:style-name="P2">Every time you modify the project code, the normal workflow will be to run:</text:p>
      <text:p text:style-name="P7">make clean<text:line-break/><text:soft-page-break/>make<text:line-break/>open -a mGBA ./*.gba</text:p>
      <text:p text:style-name="P2">You can also do it in a single line:</text:p>
      <text:p text:style-name="P7">make clean &amp;&amp; make &amp;&amp; open -a mGBA ./*.gba</text:p>
      <text:h text:style-name="P5" text:outline-level="1">19. Typical base code for a "Hello GBA"</text:h>
      <text:p text:style-name="P2">A typical minimal example using libgba can have a structure similar to this:</text:p>
      <text:p text:style-name="P7">#include &lt;gba_console.h&gt;<text:line-break/>#include &lt;gba_video.h&gt;<text:line-break/>#include &lt;gba_interrupt.h&gt;<text:line-break/>#include &lt;gba_systemcalls.h&gt;<text:line-break/>#include &lt;stdio.h&gt;<text:line-break/><text:line-break/>int main(void) {<text:line-break/> irqInit();<text:line-break/> irqEnable(IRQ_VBLANK);<text:line-break/><text:line-break/> consoleDemoInit();<text:line-break/><text:line-break/> iprintf("\x1b[10;8HHello GBA!");<text:line-break/><text:line-break/> while (1) {<text:line-break/> VBlankIntrWait();<text:line-break/> }<text:line-break/><text:line-break/> return 0;<text:line-break/>}</text:p>
      <text:p text:style-name="P2">What each part does:</text:p>
      <text:list text:style-name="L1">
        <text:list-item>
          <text:p text:style-name="P6">irqInit(): Initializes the interrupt system.</text:p>
        </text:list-item>
        <text:list-item>
          <text:p text:style-name="P6">irqEnable(IRQ_VBLANK): Enables the vertical screen interrupt.</text:p>
        </text:list-item>
        <text:list-item>
          <text:p text:style-name="P6">consoleDemoInit(): Initializes a simple text console.</text:p>
        </text:list-item>
        <text:list-item>
          <text:p text:style-name="P6">iprintf(...): Prints text on screen.</text:p>
        </text:list-item>
        <text:list-item>
          <text:p text:style-name="P6">while (1) { VBlankIntrWait(); }: Keeps the program alive and synchronized with the GBA refresh.</text:p>
        </text:list-item>
      </text:list>
      <text:h text:style-name="P5" text:outline-level="1">20. Troubleshooting common issues</text:h>
      <text:list text:style-name="L1">
        <text:list-item>
          <text:p text:style-name="P6">echo $DEVKITPRO shows nothing: Add export DEVKITPRO=/opt/devkitpro to the ~/.zshrc file and run source ~/.zshrc.</text:p>
        </text:list-item>
        <text:list-item>
          <text:p text:style-name="P6">dkp-pacman is not found: Check which dkp-pacman. If it exists at /usr/local/bin/dkp-pacman, it is correct. If not, review the devkitPro pacman .pkg installation.</text:p>
        </text:list-item>
        <text:list-item>
          <text:p text:style-name="P6">arm-none-eabi-gcc is not found: Add ${DEVKITARM}/bin to the PATH in ~/.zshrc.</text:p>
        </text:list-item>
        <text:list-item>
          <text:p text:style-name="P6">/opt/devkitpro/devkitARM does not exist: gba-dev still needs to be installed with sudo dkp-pacman -S gba-dev.</text:p>
        </text:list-item>
        <text:list-item>
          <text:p text:style-name="P6">/opt/devkitpro/examples/gba does not exist: gba-examples still needs to be installed with sudo dkp-pacman -S gba-examples.</text:p>
        </text:list-item>
        <text:list-item>
          <text:p text:style-name="P6">make does not generate a .gba file: Check that you are in the project folder and that a Makefile exists.</text:p>
        </text:list-item>
        <text:list-item>
          <text:p text:style-name="P6">mGBA does not open from the terminal: Install it with brew install --cask mgba or open the ROM manually from Finder.</text:p>
        </text:list-item>
      </text:list>
      <text:h text:style-name="P5" text:outline-level="1">21. Summary of important commands</text:h>
      <text:p text:style-name="P2"><text:soft-page-break/>Installation and verification:</text:p>
      <text:p text:style-name="P7">which dkp-pacman<text:line-break/>dkp-pacman --version<text:line-break/>sudo dkp-pacman -Syu<text:line-break/>sudo dkp-pacman -S gba-dev gba-examples<text:line-break/>ls /opt/devkitpro</text:p>
      <text:p text:style-name="P2">~/.zshrc configuration:</text:p>
      <text:p text:style-name="P7">export DEVKITPRO=/opt/devkitpro<text:line-break/>export DEVKITARM=${DEVKITPRO}/devkitARM<text:line-break/>export PATH=${DEVKITPRO}/pacman/bin:${DEVKITPRO}/tools/bin:${DEVKITARM}/bin:$PATH</text:p>
      <text:p text:style-name="P2">Verification:</text:p>
      <text:p text:style-name="P7">source ~/.zshrc<text:line-break/>echo $DEVKITPRO<text:line-break/>echo $DEVKITARM<text:line-break/>which arm-none-eabi-gcc<text:line-break/>arm-none-eabi-gcc --version</text:p>
      <text:p text:style-name="P2">Create and compile example:</text:p>
      <text:p text:style-name="P7">mkdir -p ~/GBAProjects<text:line-break/>cp -r /opt/devkitpro/examples/gba/template ~/GBAProjects/hello-gba<text:line-break/>cd ~/GBAProjects/hello-gba<text:line-break/>make<text:line-break/>find . -name "*.gba"</text:p>
      <text:p text:style-name="P2">Run ROM:</text:p>
      <text:p text:style-name="P7">open -a mGBA ./*.gba</text:p>
      <text:h text:style-name="P5" text:outline-level="1">22. Recommended next steps</text:h>
      <text:list text:style-name="L2">
        <text:list-item>
          <text:p text:style-name="P8">Modify template.c to change the text shown on screen.</text:p>
        </text:list-item>
        <text:list-item>
          <text:p text:style-name="P8">Learn to read GBA buttons: A, B, Start, Select, and D-pad.</text:p>
        </text:list-item>
        <text:list-item>
          <text:p text:style-name="P8">Move a point or simple sprite around the screen.</text:p>
        </text:list-item>
        <text:list-item>
          <text:p text:style-name="P8">Test backgrounds and images.</text:p>
        </text:list-item>
        <text:list-item>
          <text:p text:style-name="P8">Understand the basic GBA graphics modes.</text:p>
        </text:list-item>
        <text:list-item>
          <text:p text:style-name="P8">Create a very simple mini demo or game.</text:p>
        </text:list-item>
      </text:list>
      <table:table table:name="Table3" table:style-name="Table3">
        <table:table-column table:style-name="Table3.A"/>
        <table:table-row>
          <table:table-cell office:value-type="string">
            <text:p text:style-name="P3">Conclusion: The environment is now working: devkitPro is installed, devkitARM compiles correctly, the example project generates a .gba ROM, and the ROM works in mGBA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Courier New" svg:font-family="'Courier New'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Arial" fo:font-size="11pt" fo:language="en" fo:country="GB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omplete guide to developing for Game Boy Advance on macOS</dc:title>
    <meta:generator>LibreOffice/26.2.4.2$MacOSX_AARCH64 LibreOffice_project/0229ac93fcf0d7cbc6376066c6f35021cef002dc</meta:generator>
    <dc:date>2026-06-26T14:05:23.627859000</dc:date>
    <meta:editing-duration>PT21S</meta:editing-duration>
    <meta:editing-cycles>1</meta:editing-cycles>
    <meta:document-statistic meta:table-count="4" meta:image-count="0" meta:object-count="0" meta:page-count="7" meta:paragraph-count="180" meta:word-count="1444" meta:character-count="9787" meta:non-whitespace-character-count="8542"/>
  </office:meta>
</office:document-meta>
</file>