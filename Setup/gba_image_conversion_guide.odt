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manifest="urn:oasis:names:tc:opendocument:xmlns:manifest:1.0" office:version="1.3">
  <office:scripts/>
  <office:font-face-decls>
    <style:font-face style:name="Arial" svg:font-family="Arial"/>
    <style:font-face style:name="Courier New" svg:font-family="Courier New"/>
  </office:font-face-decls>
  <office:automatic-styles>
    <style:style style:name="Title" style:family="paragraph">
      <style:text-properties fo:font-size="22pt" fo:font-weight="bold" style:font-name="Arial"/>
      <style:paragraph-properties fo:margin-top="0cm" fo:margin-bottom="0.20cm"/>
    </style:style>
    <style:style style:name="Subtitle" style:family="paragraph">
      <style:text-properties fo:font-size="12pt" fo:font-style="italic" style:font-name="Arial" fo:color="#444444"/>
      <style:paragraph-properties fo:margin-bottom="0.35cm"/>
    </style:style>
    <style:style style:name="Heading_20_1" style:family="paragraph">
      <style:text-properties fo:font-size="15pt" fo:font-weight="bold" style:font-name="Arial"/>
      <style:paragraph-properties fo:margin-top="0.40cm" fo:margin-bottom="0.14cm"/>
    </style:style>
    <style:style style:name="Heading_20_2" style:family="paragraph">
      <style:text-properties fo:font-size="12.5pt" fo:font-weight="bold" style:font-name="Arial"/>
      <style:paragraph-properties fo:margin-top="0.25cm" fo:margin-bottom="0.10cm"/>
    </style:style>
    <style:style style:name="Text_20_body" style:family="paragraph">
      <style:text-properties fo:font-size="10.8pt" style:font-name="Arial"/>
      <style:paragraph-properties fo:margin-bottom="0.14cm" fo:line-height="120%"/>
    </style:style>
    <style:style style:name="ListParagraph" style:family="paragraph">
      <style:text-properties fo:font-size="10.8pt" style:font-name="Arial"/>
      <style:paragraph-properties fo:margin-bottom="0.08cm"/>
    </style:style>
    <style:style style:name="CodeBlock" style:family="paragraph">
      <style:text-properties fo:font-size="8.8pt" style:font-name="Courier New"/>
      <style:paragraph-properties fo:background-color="#F5F5F5" fo:margin-top="0.08cm" fo:margin-bottom="0.18cm" fo:padding="0.12cm"/>
    </style:style>
    <style:style style:name="TableText" style:family="paragraph">
      <style:text-properties fo:font-size="10pt" style:font-name="Arial"/>
    </style:style>
    <style:style style:name="TableHeader" style:family="paragraph">
      <style:text-properties fo:font-size="10pt" fo:font-weight="bold" style:font-name="Arial"/>
    </style:style>
    <style:style style:name="TableColumn" style:family="table-column">
      <style:table-column-properties style:rel-column-width="21845*"/>
    </style:style>
    <text:list-style style:name="BulletList">
      <text:list-level-style-bullet text:level="1" text:bullet-char="-">
        <style:list-level-properties text:min-label-width="0.6cm"/>
      </text:list-level-style-bullet>
    </text:list-style>
  </office:automatic-styles>
  <office:body>
    <office:text>
      <text:h text:style-name="Title" text:outline-level="1">Converting an Image for Game Boy Advance with grit</text:h>
      <text:p text:style-name="Subtitle">Modern devkitPro/devkitARM workflow for turning an image into data the GBA can display.</text:p>
      <text:h text:style-name="Heading_20_1" text:outline-level="1">1. Goal</text:h>
      <text:p text:style-name="Text_20_body">This guide explains how to convert an image on macOS into C data that can be included in a Game Boy Advance project and displayed on screen.</text:p>
      <text:p text:style-name="Text_20_body">The workflow uses grit, the GBA Image Transmogrifier. It replaces older Windows-only tools such as SL File2Array for this use case.</text:p>
      <text:h text:style-name="Heading_20_1" text:outline-level="1">2. What this guide creates</text:h>
      <text:p text:style-name="Text_20_body">The final result can be either a full-screen 240x160 image shown using Mode 3, a 16 bits-per-pixel bitmap video mode, or Mode 4, an 8 bits-per-pixel bitmap video mode with a 256-color palette.</text:p>
      <text:list text:style-name="BulletList">
        <text:list-item>
          <text:p text:style-name="ListParagraph">Input file: a normal image such as JPG or PNG.</text:p>
        </text:list-item>
        <text:list-item>
          <text:p text:style-name="ListParagraph">Converted files: image.c and image.h generated by grit.</text:p>
        </text:list-item>
        <text:list-item>
          <text:p text:style-name="ListParagraph">GBA code: a simple main.c or welcome_screen.c file that copies the image into VRAM.</text:p>
        </text:list-item>
        <text:list-item>
          <text:p text:style-name="ListParagraph">Mode 4 code: a palette-based version that copies imageBitmap to VRAM and imagePal to BG_PALETTE.</text:p>
        </text:list-item>
        <text:list-item>
          <text:p text:style-name="ListParagraph">Output: a .gba ROM that shows the image in mGBA or on real hardware.</text:p>
        </text:list-item>
      </text:list>
      <text:h text:style-name="Heading_20_1" text:outline-level="1">3. Required tools</text:h>
      <text:list text:style-name="BulletList">
        <text:list-item>
          <text:p text:style-name="ListParagraph">devkitPro installed on macOS.</text:p>
        </text:list-item>
        <text:list-item>
          <text:p text:style-name="ListParagraph">devkitARM and libgba installed through dkp-pacman.</text:p>
        </text:list-item>
        <text:list-item>
          <text:p text:style-name="ListParagraph">grit available in the terminal.</text:p>
        </text:list-item>
        <text:list-item>
          <text:p text:style-name="ListParagraph">mGBA or another Game Boy Advance emulator.</text:p>
        </text:list-item>
        <text:list-item>
          <text:p text:style-name="ListParagraph">A GBA project created from the devkitPro GBA template.</text:p>
        </text:list-item>
      </text:list>
      <text:p text:style-name="Text_20_body">Check that grit is available:</text:p>
      <text:p text:style-name="CodeBlock">which grit<text:line-break/>grit --help</text:p>
      <text:h text:style-name="Heading_20_1" text:outline-level="1">4. Prepare the image</text:h>
      <text:p text:style-name="Text_20_body">For the simplest Mode 3 example, use an image with the exact GBA screen size: 240x160 pixels.</text:p>
      <text:p text:style-name="Text_20_body">If your image is a JPG, convert it to PNG first. On macOS you can use sips:</text:p>
      <text:p text:style-name="CodeBlock">sips -s format png ffix.jpg --out ffix.png</text:p>
      <text:p text:style-name="Text_20_body">If the image is not already 240x160, resize it:</text:p>
      <text:p text:style-name="CodeBlock">sips -z 160 240 ffix.png --out ffix_240x160.png</text:p>
      <text:p text:style-name="Text_20_body">The first number after -z is the height and the second is the width, so 160 240 means 240x160.</text:p>
      <text:h text:style-name="Heading_20_1" text:outline-level="1">5. Convert the image with grit</text:h>
      <text:p text:style-name="Text_20_body">Use grit to generate C output for a 16 bpp bitmap. This is the important command:</text:p>
      <text:p text:style-name="CodeBlock">grit ffix_240x160.png -ftc -gb -gB16 -m! -p! -o image</text:p>
      <text:p text:style-name="Text_20_body">If your PNG is already 240x160, you can run:</text:p>
      <text:p text:style-name="CodeBlock">grit ffix.png -ftc -gb -gB16 -m! -p! -o image</text:p>
      <text:h text:style-name="Heading_20_1" text:outline-level="1">6. What each grit option means</text:h>
      <table:table table:name="Options">
        <table:table-column table:style-name="TableColumn"/>
        <table:table-column table:style-name="TableColumn"/>
        <table:table-row>
          <table:table-cell office:value-type="string">
            <text:p text:style-name="TableHeader">Option</text:p>
          </table:table-cell>
          <table:table-cell office:value-type="string">
            <text:p text:style-name="TableHeader">Meaning</text:p>
          </table:table-cell>
        </table:table-row>
        <table:table-row>
          <table:table-cell office:value-type="string">
            <text:p text:style-name="TableText">-ftc</text:p>
          </table:table-cell>
          <table:table-cell office:value-type="string">
            <text:p text:style-name="TableText">Generate C output files.</text:p>
          </table:table-cell>
        </table:table-row>
        <table:table-row>
          <table:table-cell office:value-type="string">
            <text:p text:style-name="TableText">-gb</text:p>
          </table:table-cell>
          <table:table-cell office:value-type="string">
            <text:p text:style-name="TableText">Generate bitmap graphics data instead of tiled graphics data.</text:p>
          </table:table-cell>
        </table:table-row>
        <table:table-row>
          <table:table-cell office:value-type="string">
            <text:p text:style-name="TableText">-gB16</text:p>
          </table:table-cell>
          <table:table-cell office:value-type="string">
            <text:p text:style-name="TableText">Generate 16 bits-per-pixel graphics data, suitable for Mode 3.</text:p>
          </table:table-cell>
        </table:table-row>
        <table:table-row>
          <table:table-cell office:value-type="string">
            <text:p text:style-name="TableText">-m!</text:p>
          </table:table-cell>
          <table:table-cell office:value-type="string">
            <text:p text:style-name="TableText">Do not generate a map.</text:p>
          </table:table-cell>
        </table:table-row>
        <table:table-row>
          <table:table-cell office:value-type="string">
            <text:p text:style-name="TableText">-p!</text:p>
          </table:table-cell>
          <table:table-cell office:value-type="string">
            <text:p text:style-name="TableText">Do not generate a palette. Mode 3 uses direct 16 bpp color.</text:p>
          </table:table-cell>
        </table:table-row>
        <table:table-row>
          <table:table-cell office:value-type="string">
            <text:p text:style-name="TableText">-o image</text:p>
          </table:table-cell>
          <table:table-cell office:value-type="string">
            <text:p text:style-name="TableText">Use image as the base output name, generating image.c and image.h.</text:p>
          </table:table-cell>
        </table:table-row>
      </table:table>
      <text:h text:style-name="Heading_20_1" text:outline-level="1">7. Expected generated files</text:h>
      <text:p text:style-name="Text_20_body">After running grit, you should get:</text:p>
      <text:p text:style-name="CodeBlock">image.c<text:line-break/>image.h</text:p>
      <text:p text:style-name="Text_20_body">Place both files inside the source folder of your GBA project:</text:p>
      <text:p text:style-name="CodeBlock">welcome-screen/<text:line-break/>├── Makefile<text:line-break/>└── source/<text:line-break/>    ├── image.c<text:line-break/>    ├── image.h<text:line-break/>    └── welcome_screen.c</text:p>
      <text:h text:style-name="Heading_20_1" text:outline-level="1">8. Check image.h</text:h>
      <text:p text:style-name="Text_20_body">Open image.h. For this Mode 3 workflow, the file should contain symbols similar to these:</text:p>
      <text:p text:style-name="CodeBlock">#define imageBitmapLen 76800<text:line-break/>extern const unsigned int imageBitmap[19200];</text:p>
      <text:p text:style-name="Text_20_body">The important part is that it says imageBitmap, not imageTiles.</text:p>
      <text:h text:style-name="Heading_20_1" text:outline-level="1">9. If image.h contains imageTiles</text:h>
      <text:p text:style-name="Text_20_body">If image.h contains imageTiles, the image was generated as tiles. That is not correct for this simple Mode 3 bitmap example.</text:p>
      <text:p text:style-name="Text_20_body">For example, this means the image was generated as tiles:</text:p>
      <text:p text:style-name="CodeBlock">#define imageTilesLen 76800<text:line-break/>extern const unsigned int imageTiles[19200];</text:p>
      <text:p text:style-name="Text_20_body">Fix it by regenerating the image with -gb:</text:p>
      <text:p text:style-name="CodeBlock">grit ffix_240x160.png -ftc -gb -gB16 -m! -p! -o image</text:p>
      <text:h text:style-name="Heading_20_1" text:outline-level="1">10. Complete GBA code</text:h>
      <text:p text:style-name="Text_20_body">Use this code in source/welcome_screen.c or source/main.c:</text:p>
      <text:p text:style-name="CodeBlock">// Provides video mode definitions, VRAM access, and display control functions.<text:line-break/>#include &lt;gba_video.h&gt;<text:line-break/><text:line-break/>// Provides GBA BIOS/system calls such as VBlankIntrWait().<text:line-break/>#include &lt;gba_systemcalls.h&gt;<text:line-break/><text:line-break/>// Provides interrupt functions such as irqInit() and irqEnable().<text:line-break/>#include &lt;gba_interrupt.h&gt;<text:line-break/><text:line-break/>// Provides DMA copy functions used to quickly copy data into video memory.<text:line-break/>#include &lt;gba_dma.h&gt;<text:line-break/><text:line-break/>// Header generated by grit.<text:line-break/>// It contains the converted image data and its size.<text:line-break/>#include "image.h"<text:line-break/><text:line-break/>// Program entry point.<text:line-break/>int main(void) {<text:line-break/><text:line-break/>    // Initialize the interrupt system.<text:line-break/>    // This must be done before enabling interrupts.<text:line-break/>    irqInit();<text:line-break/><text:line-break/>    // Enable the VBlank interrupt.<text:line-break/>    // VBlankIntrWait() needs this interrupt to work correctly.<text:line-break/>    irqEnable(IRQ_VBLANK);<text:line-break/><text:line-break/>    // Set the GBA video mode.<text:line-break/>    //<text:line-break/>    // MODE_3 is a 240x160 bitmap mode using 16 bits per pixel.<text:line-break/>    // BG2_ON enables background 2, which is used by bitmap modes.<text:line-break/>    SetMode(MODE_3 | BG2_ON);<text:line-break/><text:line-break/>    // Copy the image data generated by grit into VRAM.<text:line-break/>    //<text:line-break/>    // imageBitmap is the converted 16 bpp bitmap data.<text:line-break/>    // VRAM is the video memory address.<text:line-break/>    // imageBitmapLen is the total size of the image data in bytes.<text:line-break/>    //<text:line-break/>    // VRAM is defined as a numeric address, so it is cast to void*<text:line-break/>    // because dmaCopy() expects a pointer destination.<text:line-break/>    dmaCopy(imageBitmap, (void*)VRAM, imageBitmapLen);<text:line-break/><text:line-break/>    // Main loop.<text:line-break/>    // GBA programs usually keep running forever.<text:line-break/>    while (1) {<text:line-break/><text:line-break/>        // Wait for the next vertical blank period.<text:line-break/>        // This keeps the program synchronized with the screen refresh.<text:line-break/>        VBlankIntrWait();<text:line-break/>    }<text:line-break/>}</text:p>
      <text:h text:style-name="Heading_20_1" text:outline-level="1">11. Compile the project</text:h>
      <text:p text:style-name="Text_20_body">Run make from the root of the project, where the Makefile is located. Do not run make from inside the source folder.</text:p>
      <text:p text:style-name="CodeBlock">cd ~/Projects/gba-development/GBAProjects/welcome-screen<text:line-break/>make clean<text:line-break/>make</text:p>
      <text:p text:style-name="Text_20_body">If compilation succeeds, a .gba ROM will be generated in the project folder.</text:p>
      <text:h text:style-name="Heading_20_1" text:outline-level="1">12. Run the ROM in mGBA</text:h>
      <text:p text:style-name="CodeBlock">open -a mGBA ./*.gba</text:p>
      <text:h text:style-name="Heading_20_1" text:outline-level="1">13. Common issues</text:h>
      <text:h text:style-name="Heading_20_2" text:outline-level="2">make: no targets specified and no makefile found</text:h>
      <text:p text:style-name="Text_20_body">This means you ran make from the wrong folder. Go to the project root, where the Makefile exists.</text:p>
      <text:p text:style-name="CodeBlock">cd ..<text:line-break/>make</text:p>
      <text:h text:style-name="Heading_20_2" text:outline-level="2">fatal error: image.h: No such file or directory</text:h>
      <text:p text:style-name="Text_20_body">Make sure image.h is inside the source folder or in a folder included by the Makefile.</text:p>
      <text:h text:style-name="Heading_20_2" text:outline-level="2">imageBitmap is undeclared</text:h>
      <text:p text:style-name="Text_20_body">Open image.h. If it contains imageTiles instead of imageBitmap, regenerate the image using -gb.</text:p>
      <text:h text:style-name="Heading_20_2" text:outline-level="2">The image looks corrupted</text:h>
      <text:p text:style-name="Text_20_body">The most common cause is using tiled data as if it were a Mode 3 bitmap. Regenerate the image with:</text:p>
      <text:p text:style-name="CodeBlock">grit ffix_240x160.png -ftc -gb -gB16 -m! -p! -o image</text:p>
      <text:h text:style-name="Heading_20_2" text:outline-level="2">dmaCopy complains about VRAM</text:h>
      <text:p text:style-name="Text_20_body">In libgba, VRAM may be defined as a numeric address. Cast it to a pointer when passing it to dmaCopy:</text:p>
      <text:p text:style-name="CodeBlock">dmaCopy(imageBitmap, (void*)VRAM, imageBitmapLen);</text:p>
      <text:h text:style-name="Heading_20_1" text:outline-level="1">14. Difference from the old PCX tutorial</text:h>
      <text:p text:style-name="Text_20_body">The old tutorial uses a PCX file converted to a C byte array and then decodes the PCX at runtime using DecodePCX(). That requires pcx.c, pcx.h, fade.c, fade.h, and a splash_pcx.h file.</text:p>
      <text:p text:style-name="Text_20_body">The grit workflow is different. It converts the image ahead of time into GBA-ready graphics data. For this Mode 3 example, no PCX decoder, fade helper, or palette buffer is required.</text:p>
      <text:h text:style-name="Heading_20_1" text:outline-level="1">15. Mode 4: 8 bpp bitmap with palette</text:h>
      <text:p text:style-name="Text_20_body">Mode 4 is also a bitmap mode, but unlike Mode 3 it uses 8 bits per pixel and a 256-color palette.</text:p>
      <text:p text:style-name="Text_20_body">This means the image data copied to VRAM is smaller, but the image also needs palette data. For a full-screen 240x160 image, the bitmap data should be 38400 bytes.</text:p>
      <text:list text:style-name="BulletList">
        <text:list-item>
          <text:p text:style-name="ListParagraph">Mode 3: 240x160, 16 bpp, direct color, no palette, 76800 bytes.</text:p>
        </text:list-item>
        <text:list-item>
          <text:p text:style-name="ListParagraph">Mode 4: 240x160, 8 bpp, indexed color, 256-color palette, 38400 bytes.</text:p>
        </text:list-item>
        <text:list-item>
          <text:p text:style-name="ListParagraph">Mode 4 is useful when you want palette effects such as fading in from black.</text:p>
        </text:list-item>
      </text:list>
      <text:h text:style-name="Heading_20_2" text:outline-level="2">15.1 Prepare the image for Mode 4</text:h>
      <text:p text:style-name="Text_20_body">The image should be 240x160 pixels and should use no more than 256 colors. If the image has more colors, grit will reduce it to a palette, but the result may look better if you prepare the palette yourself in an image editor first.</text:p>
      <text:p text:style-name="Text_20_body">For example, resize the image with sips:</text:p>
      <text:p text:style-name="CodeBlock">sips -z 160 240 castlevania_ii.png --out castlevania_ii_240x160.png</text:p>
      <text:p text:style-name="Text_20_body">If the image is already exactly 240x160, you can use it directly.</text:p>
      <text:h text:style-name="Heading_20_2" text:outline-level="2">15.2 Convert the image with grit for Mode 4</text:h>
      <text:p text:style-name="Text_20_body">For a Mode 4 full-screen bitmap, generate 8 bpp bitmap graphics and a palette. The important part is to generate bitmap data, not tiled data.</text:p>
      <text:p text:style-name="CodeBlock">grit castlevania_ii.png -ftc -gb -gB8 -gT! -m! -p -o image</text:p>
      <text:p text:style-name="Text_20_body">If you are using the resized file, run:</text:p>
      <text:p text:style-name="CodeBlock">grit castlevania_ii_240x160.png -ftc -gb -gB8 -gT! -m! -p -o image</text:p>
      <text:h text:style-name="Heading_20_2" text:outline-level="2">15.3 What each Mode 4 grit option means</text:h>
      <text:p text:style-name="Text_20_body">These are the relevant differences compared with the Mode 3 command:</text:p>
      <text:list text:style-name="BulletList">
        <text:list-item>
          <text:p text:style-name="ListParagraph">-gb: generate bitmap graphics data.</text:p>
        </text:list-item>
        <text:list-item>
          <text:p text:style-name="ListParagraph">-gB8: generate 8 bits-per-pixel graphics data, suitable for Mode 4.</text:p>
        </text:list-item>
        <text:list-item>
          <text:p text:style-name="ListParagraph">-gT!: do not generate tiled graphics data.</text:p>
        </text:list-item>
        <text:list-item>
          <text:p text:style-name="ListParagraph">-m!: do not generate a tile map.</text:p>
        </text:list-item>
        <text:list-item>
          <text:p text:style-name="ListParagraph">-p: generate a palette.</text:p>
        </text:list-item>
        <text:list-item>
          <text:p text:style-name="ListParagraph">-o image: generate image.c and image.h using image as the base symbol name.</text:p>
        </text:list-item>
      </text:list>
      <text:h text:style-name="Heading_20_2" text:outline-level="2">15.4 Check image.h for Mode 4</text:h>
      <text:p text:style-name="Text_20_body">After running grit, open image.h. For Mode 4, it should contain symbols similar to these:</text:p>
      <text:p text:style-name="CodeBlock">#define imageBitmapLen 38400<text:line-break/>extern const unsigned int imageBitmap[9600];<text:line-break/><text:line-break/>#define imagePalLen 512<text:line-break/>extern const unsigned short imagePal[256];</text:p>
      <text:p text:style-name="Text_20_body">The important symbols are imageBitmap, imageBitmapLen, imagePal, and imagePalLen.</text:p>
      <text:p text:style-name="Text_20_body">If the file contains imageTiles instead of imageBitmap, the image was generated as tiled graphics. That will look corrupted if you copy it directly to VRAM in Mode 4.</text:p>
      <text:p text:style-name="Text_20_body">Fix that by regenerating the image with -gb and -gT!:</text:p>
      <text:p text:style-name="CodeBlock">grit castlevania_ii.png -ftc -gb -gB8 -gT! -m! -p -o image</text:p>
      <text:h text:style-name="Heading_20_2" text:outline-level="2">15.5 Copy the Mode 4 image and palette</text:h>
      <text:p text:style-name="Text_20_body">In Mode 4, copy the bitmap data to VRAM and the palette data to BG_PALETTE.</text:p>
      <text:p text:style-name="CodeBlock">SetMode(MODE_4 | BG2_ON);<text:line-break/><text:line-break/>dmaCopy(imageBitmap, (void*)VRAM, imageBitmapLen);<text:line-break/>dmaCopy(imagePal, BG_PALETTE, imagePalLen);</text:p>
      <text:h text:style-name="Heading_20_2" text:outline-level="2">15.6 Complete Mode 4 code without fade</text:h>
      <text:p text:style-name="Text_20_body">Use this minimal version first to confirm that the image displays correctly:</text:p>
      <text:p text:style-name="CodeBlock">#include &lt;gba_video.h&gt;<text:line-break/>#include &lt;gba_systemcalls.h&gt;<text:line-break/>#include &lt;gba_interrupt.h&gt;<text:line-break/>#include &lt;gba_dma.h&gt;<text:line-break/><text:line-break/>#include "image.h"<text:line-break/><text:line-break/>int main(void) {<text:line-break/>    irqInit();<text:line-break/>    irqEnable(IRQ_VBLANK);<text:line-break/><text:line-break/>    SetMode(MODE_4 | BG2_ON);<text:line-break/><text:line-break/>    dmaCopy(imageBitmap, (void*)VRAM, imageBitmapLen);<text:line-break/>    dmaCopy(imagePal, BG_PALETTE, imagePalLen);<text:line-break/><text:line-break/>    while (1) {<text:line-break/>        VBlankIntrWait();<text:line-break/>    }<text:line-break/>}</text:p>
      <text:h text:style-name="Heading_20_2" text:outline-level="2">15.7 Mode 4 fade-in using the palette</text:h>
      <text:p text:style-name="Text_20_body">Because Mode 4 uses a palette, a simple fade-in can be done by gradually copying brighter versions of the palette to BG_PALETTE.</text:p>
      <text:p text:style-name="CodeBlock">#define PALETTE_COLORS 256<text:line-break/>#define FPS_FADE_IN 15<text:line-break/><text:line-break/>u16 fadePalette[PALETTE_COLORS];<text:line-break/><text:line-break/>void setBlackPalette(void) {<text:line-break/>    for (int i = 0; i &lt; PALETTE_COLORS; i++) {<text:line-break/>        fadePalette[i] = 0;<text:line-break/>    }<text:line-break/><text:line-break/>    dmaCopy(fadePalette, BG_PALETTE, PALETTE_COLORS * sizeof(u16));<text:line-break/>}<text:line-break/><text:line-break/>void fadeInPalette(int frames) {<text:line-break/>    for (int step = 0; step &lt;= frames; step++) {<text:line-break/>        for (int i = 0; i &lt; PALETTE_COLORS; i++) {<text:line-break/>            u16 color = imagePal[i];<text:line-break/><text:line-break/>            int red = color &amp; 0x1F;<text:line-break/>            int green = (color &gt;&gt; 5) &amp; 0x1F;<text:line-break/>            int blue = (color &gt;&gt; 10) &amp; 0x1F;<text:line-break/><text:line-break/>            red = (red * step) / frames;<text:line-break/>            green = (green * step) / frames;<text:line-break/>            blue = (blue * step) / frames;<text:line-break/><text:line-break/>            fadePalette[i] = red | (green &lt;&lt; 5) | (blue &lt;&lt; 10);<text:line-break/>        }<text:line-break/><text:line-break/>        VBlankIntrWait();<text:line-break/>        dmaCopy(fadePalette, BG_PALETTE, PALETTE_COLORS * sizeof(u16));<text:line-break/>    }<text:line-break/>}</text:p>
      <text:p text:style-name="Text_20_body">Then use it like this in main():</text:p>
      <text:p text:style-name="CodeBlock">SetMode(MODE_4 | BG2_ON);<text:line-break/><text:line-break/>setBlackPalette();<text:line-break/>dmaCopy(imageBitmap, (void*)VRAM, imageBitmapLen);<text:line-break/>fadeInPalette(FPS_FADE_IN);</text:p>
      <text:h text:style-name="Heading_20_2" text:outline-level="2">15.8 Common Mode 4 mistakes</text:h>
      <text:list text:style-name="BulletList">
        <text:list-item>
          <text:p text:style-name="ListParagraph">Using imageTiles with dmaCopy(..., VRAM, ...) makes the image look corrupted because tiled graphics are not linear Mode 4 bitmap data.</text:p>
        </text:list-item>
        <text:list-item>
          <text:p text:style-name="ListParagraph">Forgetting -p means no palette is generated, so imagePal will not exist.</text:p>
        </text:list-item>
        <text:list-item>
          <text:p text:style-name="ListParagraph">Using -gB16 creates Mode 3-style 16 bpp data, not Mode 4 8 bpp data.</text:p>
        </text:list-item>
        <text:list-item>
          <text:p text:style-name="ListParagraph">A Mode 4 full-screen image should be 38400 bytes. If it is 76800 bytes, it is probably 16 bpp Mode 3 data.</text:p>
        </text:list-item>
        <text:list-item>
          <text:p text:style-name="ListParagraph">If image.h does not contain imageBitmap, regenerate with -gb and -gT!.</text:p>
        </text:list-item>
      </text:list>
      <text:h text:style-name="Heading_20_1" text:outline-level="1">16. Summary</text:h>
      <text:p text:style-name="CodeBlock">sips -s format png ffix.jpg --out ffix.png<text:line-break/>sips -z 160 240 ffix.png --out ffix_240x160.png<text:line-break/>grit ffix_240x160.png -ftc -gb -gB16 -m! -p! -o image<text:line-break/># Mode 4 alternative:<text:line-break/>grit castlevania_ii.png -ftc -gb -gB8 -gT! -m! -p -o image<text:line-break/>make clean<text:line-break/>make<text:line-break/>open -a mGBA ./*.g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manifest="urn:oasis:names:tc:opendocument:xmlns:manifest:1.0" office:version="1.3">
  <office:font-face-decls>
    <style:font-face style:name="Arial" svg:font-family="Arial"/>
    <style:font-face style:name="Courier New" svg:font-family="Courier New"/>
  </office:font-face-decls>
  <office:styles>
    <style:default-style style:family="paragraph">
      <style:text-properties style:font-name="Arial" fo:font-size="11pt"/>
    </style:default-style>
  </office:styles>
  <office:automatic-styles>
    <style:page-layout style:name="pm1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manifest="urn:oasis:names:tc:opendocument:xmlns:manifest:1.0" office:version="1.3">
  <office:meta>
    <dc:title>Converting an Image for Game Boy Advance with grit</dc:title>
    <meta:generator>OpenAI Codex</meta:generator>
  </office:meta>
</office:document-meta>
</file>